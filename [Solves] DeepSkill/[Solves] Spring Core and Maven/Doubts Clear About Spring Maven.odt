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7" style:family="paragraph" style:parent-style-name="Preformatted_20_Text">
      <style:paragraph-properties fo:margin-top="0cm" fo:margin-bottom="0cm" style:contextual-spacing="false" fo:line-height="114%"/>
    </style:style>
    <style:style style:name="P8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style:font-name="Google Sans Text"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style="italic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s the clear, direct breakdown of what you just accomplished, why it matters, and how it fits into professional software design.</text:p>
      <text:section text:style-name="Sect1" text:name="model-response-message-contentr_c2a288203b525b7b">
        <text:h text:style-name="P2" text:outline-level="3">1. What You Did Just Now</text:h>
        <text:list text:style-name="L1">
          <text:list-item>
            <text:p text:style-name="P3"><text:bookmark text:name="p-rc_f6e9998dbcf8023a-111"/><text:span text:style-name="T1">Added AOP Capabilities:</text:span><text:span text:style-name="T2"> You injected the Spring AOP and AspectJ libraries into your </text:span><text:span text:style-name="Source_20_Text"><text:span text:style-name="T2">pom.xml</text:span></text:span><text:span text:style-name="T2"> file. </text:span></text:p>
          </text:list-item>
          <text:list-item>
            <text:p text:style-name="P3"><text:bookmark text:name="p-rc_f6e9998dbcf8023a-112"/><text:span text:style-name="T1">Built a Timer (Aspect):</text:span><text:span text:style-name="T2"> You created a </text:span><text:span text:style-name="Source_20_Text"><text:span text:style-name="T2">LoggingAspect</text:span></text:span><text:span text:style-name="T2"> class designed entirely to track how many milliseconds a process takes to execute. </text:span></text:p>
          </text:list-item>
          <text:list-item>
            <text:p text:style-name="P3"><text:bookmark text:name="p-rc_f6e9998dbcf8023a-113"/><text:span text:style-name="T1">Configured Interception:</text:span><text:span text:style-name="T2"> You updated </text:span><text:span text:style-name="Source_20_Text"><text:span text:style-name="T2">applicationContext.xml</text:span></text:span><text:span text:style-name="T2"> with an AOP pointcut rule telling Spring to automatically trigger your timer whenever any method inside </text:span><text:span text:style-name="Source_20_Text"><text:span text:style-name="T2">BookService</text:span></text:span><text:span text:style-name="T2"> runs. </text:span></text:p>
          </text:list-item>
        </text:list>
        <text:h text:style-name="P2" text:outline-level="3">2. Why You Did It</text:h>
        <text:p text:style-name="P4"><text:span text:style-name="T2">If you wanted to measure how fast </text:span><text:span text:style-name="Source_20_Text"><text:span text:style-name="T2">registerNewBook()</text:span></text:span><text:span text:style-name="T2"> runs </text:span><text:span text:style-name="T3">without</text:span><text:span text:style-name="T2"> AOP, you would have to manually open </text:span><text:span text:style-name="Source_20_Text"><text:span text:style-name="T2">BookService.java</text:span></text:span><text:span text:style-name="T2">, add lines to grab the system time at the beginning, calculate the difference at the end, and log it.</text:span></text:p>
        <text:p text:style-name="P1"><text:bookmark text:name="p-rc_f6e9998dbcf8023a-114"/><text:span text:style-name="T4">The problem with that manual approach:</text:span> It pollutes your clean business logic with tracking boilerplate. If you have 200 service classes, you would have to copy-paste that timing code 200 times. With AOP, you wrote the timer <text:span text:style-name="T4">once</text:span>, and Spring wraps it around your classes automatically. </text:p>
        <text:h text:style-name="P2" text:outline-level="3">3. The Bigger Picture: Aspect-Oriented Programming (AOP)</text:h>
        <text:p text:style-name="P1">In enterprise software engineering, this setup represents a powerful paradigm shift called <text:span text:style-name="T4">Separation of Concerns</text:span>.</text:p>
        <text:p text:style-name="P1">An application has two distinct types of code:</text:p>
        <text:list text:style-name="L2">
          <text:list-item>
            <text:p text:style-name="P5"><text:span text:style-name="T4">Core Concerns:</text:span> The actual business workflows (e.g., enrolling a student, validating a library book).</text:p>
          </text:list-item>
          <text:list-item>
            <text:p text:style-name="P5"><text:span text:style-name="T4">Cross-Cutting Concerns:</text:span> Systemic, repetitive tasks that <text:span text:style-name="T5">every</text:span> feature needs but aren't part of the core business logic.</text:p>
          </text:list-item>
        </text:list>
        <text:p text:style-name="P6"><text:span text:style-name="Source_20_Text"><text:s text:c="3"/></text:span><text:span text:style-name="Source_20_Text"><text:span text:style-name="T2">[ Cross-Cutting Concerns: Logging / Security / Transactions ]</text:span></text:span></text:p>
        <text:p text:style-name="P7"><text:span text:style-name="Source_20_Text"><text:span text:style-name="T2">------------------------------------------------------------------</text:span></text:span></text:p>
        <text:p text:style-name="P7"><text:span text:style-name="Source_20_Text"><text:s text:c="6"/>↓↓ <text:s text:c="21"/>↓↓ <text:s text:c="21"/>↓↓</text:span></text:p>
        <text:p text:style-name="P7"><text:span text:style-name="Source_20_Text"><text:span text:style-name="T2">[ BookService ] <text:s text:c="7"/>[ UserService ] <text:s text:c="7"/>[ PaymentService ]</text:span></text:span></text:p>
        <text:h text:style-name="P8" text:outline-level="4">What AOP achieves on a large scale:</text:h>
        <text:list text:style-name="L3">
          <text:list-item>
            <text:p text:style-name="P9"><text:span text:style-name="T4">Zero Code Duplication:</text:span> Tasks like <text:span text:style-name="T4">Logging</text:span>, <text:span text:style-name="T4">User Authentication</text:span>, <text:span text:style-name="T4">Database Transaction Management</text:span>, and <text:span text:style-name="T4">Data Caching</text:span> are entirely stripped out of your everyday service classes.</text:p>
          </text:list-item>
          <text:list-item>
            <text:p text:style-name="P9"><text:span text:style-name="T4">Plug-and-Play Architecture:</text:span> You can instantly turn performance tracking or security validation on or off across your entire enterprise system just by changing a single line in your configuration file, leaving your core business code untouched and easy to maintain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7T22:10:57.235426200</meta:creation-date>
    <dc:date>2026-07-17T22:11:12.650922500</dc:date>
    <meta:editing-duration>PT18S</meta:editing-duration>
    <meta:editing-cycles>1</meta:editing-cycles>
    <meta:document-statistic meta:table-count="0" meta:image-count="0" meta:object-count="0" meta:page-count="1" meta:paragraph-count="20" meta:word-count="334" meta:character-count="2260" meta:non-whitespace-character-count="1884"/>
    <meta:generator>LibreOffice/26.2.4.2$Windows_X86_64 LibreOffice_project/0229ac93fcf0d7cbc6376066c6f35021cef002dc</meta:generator>
  </office:meta>
</office:document-meta>
</file>