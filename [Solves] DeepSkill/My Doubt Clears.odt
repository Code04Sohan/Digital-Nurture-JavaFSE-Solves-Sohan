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4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8" style:family="paragraph" style:parent-style-name="Preformatted_20_Text">
      <style:paragraph-properties fo:margin-top="0cm" fo:margin-bottom="0cm" style:contextual-spacing="false" fo:line-height="114%"/>
    </style:style>
    <style:style style:name="T1" style:family="text">
      <style:text-properties style:font-name="Google Sans"/>
    </style:style>
    <style:style style:name="T2" style:family="text">
      <style:text-properties style:font-name="Google Sans Text"/>
    </style:style>
    <style:style style:name="T3" style:family="text">
      <style:text-properties fo:font-weight="bold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 Text" fo:font-style="italic"/>
    </style:style>
    <style:style style:name="T6" style:family="text">
      <style:text-properties fo:font-style="itali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se are excellent architectural questions. When you are just starting React, some of its rules feel like extra, unnecessary work.</text:p>
      <text:section text:style-name="Sect1" text:name="model-response-message-contentr_4ee639c23b76bf06">
        <text:p text:style-name="P1">Here is the direct explanation for why React is designed this way.</text:p>
        <text:h text:style-name="P2" text:outline-level="3"><text:span text:style-name="T1">1. Why use </text:span><text:span text:style-name="Source_20_Text"><text:span text:style-name="T2">render()</text:span></text:span><text:span text:style-name="T1"> if we can just return HTML?</text:span></text:h>
        <text:p text:style-name="P1">The answer depends entirely on <text:span text:style-name="T3">which type</text:span> of component you are building. React has two different ways to write components:</text:p>
        <text:list text:style-name="L1">
          <text:list-item>
            <text:p text:style-name="P3"><text:span text:style-name="T4">Class Components (Older style):</text:span><text:span text:style-name="T2"> When you write </text:span><text:span text:style-name="Source_20_Text"><text:span text:style-name="T2">class Cart extends React.Component</text:span></text:span><text:span text:style-name="T2">, you are creating a complex JavaScript object. Classes can hold dozens of different custom functions. Because of this, React demands that you use one specifically named </text:span><text:span text:style-name="Source_20_Text"><text:span text:style-name="T2">render()</text:span></text:span><text:span text:style-name="T2"> so it knows exactly </text:span><text:span text:style-name="T5">which</text:span><text:span text:style-name="T2"> of your many functions contains the HTML to draw on the screen.</text:span></text:p>
          </text:list-item>
          <text:list-item>
            <text:p text:style-name="P3"><text:span text:style-name="T4">Function Components (Modern style):</text:span><text:span text:style-name="T2"> When you write </text:span><text:span text:style-name="Source_20_Text"><text:span text:style-name="T2">function ListOfPlayers()</text:span></text:span><text:span text:style-name="T2">, the </text:span><text:span text:style-name="T5">entire function</text:span><text:span text:style-name="T2"> is assumed to be the drawing instructions. Because it is just a simple function, React doesn't need a special </text:span><text:span text:style-name="Source_20_Text"><text:span text:style-name="T2">render()</text:span></text:span><text:span text:style-name="T2"> method; you can just </text:span><text:span text:style-name="Source_20_Text"><text:span text:style-name="T2">return</text:span></text:span><text:span text:style-name="T2"> the HTML directly. You are using this modern style now, which is why you can skip </text:span><text:span text:style-name="Source_20_Text"><text:span text:style-name="T2">render()</text:span></text:span><text:span text:style-name="T2">.</text:span></text:p>
          </text:list-item>
        </text:list>
        <text:h text:style-name="P4" text:outline-level="3">2. Why use Props instead of just grabbing the data directly?</text:h>
        <text:p text:style-name="P5"><text:span text:style-name="T2">You noticed that in your </text:span><text:span text:style-name="Source_20_Text"><text:span text:style-name="T2">ListofPlayers.js</text:span></text:span><text:span text:style-name="T2"> file, your </text:span><text:span text:style-name="Source_20_Text"><text:span text:style-name="T2">const players = [...]</text:span></text:span><text:span text:style-name="T2"> array is sitting right next to your </text:span><text:span text:style-name="Source_20_Text"><text:span text:style-name="T2">listOfPlayers</text:span></text:span><text:span text:style-name="T2"> component. It seems silly to export it to </text:span><text:span text:style-name="Source_20_Text"><text:span text:style-name="T2">App.js</text:span></text:span><text:span text:style-name="T2">, only to pass it </text:span><text:span text:style-name="T5">back</text:span><text:span text:style-name="T2"> into the component via </text:span><text:span text:style-name="Source_20_Text"><text:span text:style-name="T2">&lt;ListOfPlayers players="{players}"/&gt;</text:span></text:span><text:span text:style-name="T2">.</text:span></text:p>
        <text:p text:style-name="P1">If you just grab the array directly inside the component without props, the component becomes <text:span text:style-name="T3">rigid and hardcoded</text:span>.</text:p>
        <text:p text:style-name="P6">The Rigid Way (Without Props):</text:p>
        <text:p text:style-name="P1">JavaScript</text:p>
        <text:p text:style-name="P7"><text:span text:style-name="Source_20_Text"><text:span text:style-name="T2">function ListOfPlayers() {</text:span></text:span></text:p>
        <text:p text:style-name="P7"><text:span text:style-name="Source_20_Text"><text:s text:c="2"/></text:span><text:span text:style-name="Source_20_Text"><text:span text:style-name="T2">// This component is permanently glued to the 'players' array.</text:span></text:span></text:p>
        <text:p text:style-name="P7"><text:span text:style-name="Source_20_Text"><text:s text:c="2"/></text:span><text:span text:style-name="Source_20_Text"><text:span text:style-name="T2">// It can never display anything else.</text:span></text:span></text:p>
        <text:p text:style-name="P7"><text:span text:style-name="Source_20_Text"><text:s text:c="2"/></text:span><text:span text:style-name="Source_20_Text"><text:span text:style-name="T2">return players.map(...) </text:span></text:span></text:p>
        <text:p text:style-name="P8"><text:span text:style-name="Source_20_Text"><text:span text:style-name="T2">}</text:span></text:span></text:p>
        <text:p text:style-name="P6">The React Way (With Props):</text:p>
        <text:p text:style-name="P1">JavaScript</text:p>
        <text:p text:style-name="P7"><text:span text:style-name="Source_20_Text"><text:span text:style-name="T2">function ListOfPlayers({ players }) {</text:span></text:span></text:p>
        <text:p text:style-name="P7"><text:span text:style-name="Source_20_Text"><text:s text:c="2"/></text:span><text:span text:style-name="Source_20_Text"><text:span text:style-name="T2">// This component is a blank template. </text:span></text:span></text:p>
        <text:p text:style-name="P7"><text:span text:style-name="Source_20_Text"><text:s text:c="2"/></text:span><text:span text:style-name="Source_20_Text"><text:span text:style-name="T2">// It doesn't care WHERE the data comes from, it just knows how to draw it.</text:span></text:span></text:p>
        <text:p text:style-name="P7"><text:span text:style-name="Source_20_Text"><text:s text:c="2"/></text:span><text:span text:style-name="Source_20_Text"><text:span text:style-name="T2">return players.map(...)</text:span></text:span></text:p>
        <text:p text:style-name="P8"><text:span text:style-name="Source_20_Text"><text:span text:style-name="T2">}</text:span></text:span></text:p>
        <text:h text:style-name="P4" text:outline-level="3">3. The true power of Props: Reusability</text:h>
        <text:p text:style-name="P5"><text:span text:style-name="T2">By forcing your component to accept data via </text:span><text:span text:style-name="Source_20_Text"><text:span text:style-name="T2">props</text:span></text:span><text:span text:style-name="T2">, you turn it into a reusable machine.</text:span></text:p>
        <text:p text:style-name="P1">Right now, you are passing the main players array into it. But because you used props, you could use that <text:span text:style-name="T3">exact same component</text:span> to display completely different data without <text:soft-page-break/>changing a single line of its code.</text:p>
        <text:p text:style-name="P5"><text:span text:style-name="T2">For example, in </text:span><text:span text:style-name="Source_20_Text"><text:span text:style-name="T2">App.js</text:span></text:span><text:span text:style-name="T2">, you could do this:</text:span></text:p>
        <text:p text:style-name="P1">JavaScript</text:p>
        <text:p text:style-name="P7"><text:span text:style-name="Source_20_Text"><text:span text:style-name="T2">{/* Displays the original 11 players */}</text:span></text:span></text:p>
        <text:p text:style-name="P8"><text:span text:style-name="Source_20_Text"><text:span text:style-name="T2">&lt;ListOfPlayers players={players} /&gt; </text:span></text:span></text:p>
        <text:p text:style-name="P8"/>
        <text:p text:style-name="P7"><text:span text:style-name="Source_20_Text"><text:span text:style-name="T2">{/* Displays ONLY the 3 T20 players using the exact same component! */}</text:span></text:span></text:p>
        <text:p text:style-name="P8"><text:span text:style-name="Source_20_Text"><text:span text:style-name="T2">&lt;ListOfPlayers players={T20Players} /&gt; </text:span></text:span></text:p>
        <text:p text:style-name="P1"><text:span text:style-name="T3">Summary:</text:span> Props disconnect the <text:span text:style-name="T6">visual design</text:span> of your component from the <text:span text:style-name="T6">hardcoded data</text:span>. This is the fundamental building block of React: write the visual code once, and pump different data through it using props whenever you need to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5T21:38:51.012152600</meta:creation-date>
    <dc:date>2026-07-15T21:38:53.000586900</dc:date>
    <meta:editing-duration>PT2S</meta:editing-duration>
    <meta:editing-cycles>1</meta:editing-cycles>
    <meta:document-statistic meta:table-count="0" meta:image-count="0" meta:object-count="0" meta:page-count="2" meta:paragraph-count="33" meta:word-count="440" meta:character-count="2701" meta:non-whitespace-character-count="2280"/>
    <meta:generator>LibreOffice/26.2.4.2$Windows_X86_64 LibreOffice_project/0229ac93fcf0d7cbc6376066c6f35021cef002dc</meta:generator>
  </office:meta>
</office:document-meta>
</file>