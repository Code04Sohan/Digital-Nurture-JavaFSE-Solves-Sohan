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ME Walkthrough (Project Structure &amp; Concepts)</text:h>
      <text:p text:style-name="Text_20_body">Here is the walkthrough of the project aspects as required by your hands-on:</text:p>
      <text:p text:style-name="P1">1. Directory Structure:</text:p>
      <text:list text:style-name="L1">
        <text:list-item>
          <text:p text:style-name="P2"><text:span text:style-name="Source_20_Text"><text:span text:style-name="T1">src/main/java</text:span></text:span>: This is where all your actual Java application source code lives (Controllers, Services, Models, Repositories).</text:p>
        </text:list-item>
        <text:list-item>
          <text:p text:style-name="P2"><text:span text:style-name="Source_20_Text"><text:span text:style-name="T1">src/main/resources</text:span></text:span>: This folder contains application configurations. The most important file here is <text:span text:style-name="Source_20_Text">application.properties</text:span> (or <text:span text:style-name="Source_20_Text">application.yml</text:span>), where you configure server ports, database connections, and logging levels.</text:p>
        </text:list-item>
        <text:list-item>
          <text:p text:style-name="P2"><text:span text:style-name="Source_20_Text"><text:span text:style-name="T1">src/test/java</text:span></text:span>: This folder holds your unit and integration tests. Spring Initializr automatically provides a basic context load test here.</text:p>
        </text:list-item>
      </text:list>
      <text:p text:style-name="Text_20_body"><text:span text:style-name="T1">2. </text:span><text:span text:style-name="Source_20_Text"><text:span text:style-name="T1">SpringLearnApplication.java</text:span></text:span><text:span text:style-name="T1"> &amp; </text:span><text:span text:style-name="Source_20_Text"><text:span text:style-name="T1">@SpringBootApplication</text:span></text:span><text:span text:style-name="T1">:</text:span></text:p>
      <text:list text:style-name="L2">
        <text:list-item>
          <text:p text:style-name="P3"><text:span text:style-name="Source_20_Text"><text:span text:style-name="T1">main()</text:span></text:span><text:span text:style-name="T1"> method</text:span>: This is the standard entry point of any Java application. <text:span text:style-name="Source_20_Text">SpringApplication.run()</text:span> launches the Spring Boot application, starts the embedded web server (Tomcat), and initializes the Spring Application Context.</text:p>
        </text:list-item>
        <text:list-item>
          <text:p text:style-name="P3"><text:span text:style-name="Source_20_Text"><text:span text:style-name="T1">@SpringBootApplication</text:span></text:span>: This is a convenience annotation that wraps three highly important annotations:</text:p>
          <text:list>
            <text:list-item>
              <text:p text:style-name="P3"><text:span text:style-name="Source_20_Text">@Configuration</text:span>: Tags the class as a source of bean definitions.</text:p>
            </text:list-item>
            <text:list-item>
              <text:p text:style-name="P3"><text:span text:style-name="Source_20_Text">@EnableAutoConfiguration</text:span>: Tells Spring Boot to start adding beans based on classpath settings, other beans, and various property settings (e.g., if it sees <text:span text:style-name="Source_20_Text">spring-web</text:span>, it sets up a Tomcat server).</text:p>
            </text:list-item>
            <text:list-item>
              <text:p text:style-name="P3"><text:span text:style-name="Source_20_Text">@ComponentScan</text:span>: Tells Spring to look for other components, configurations, and services in the <text:span text:style-name="Source_20_Text">com.cognizant.spring_learn</text:span> package, allowing it to find your controllers and services automatically.</text:p>
            </text:list-item>
          </text:list>
        </text:list-item>
      </text:list>
      <text:p text:style-name="Text_20_body"><text:span text:style-name="T1">3. </text:span><text:span text:style-name="Source_20_Text"><text:span text:style-name="T1">pom.xml</text:span></text:span><text:span text:style-name="T1"> (Project Object Model):</text:span></text:p>
      <text:list text:style-name="L3">
        <text:list-item>
          <text:p text:style-name="P4">This XML file is the heart of a Maven project. It defines the project's dependencies, version, and build plugins.</text:p>
        </text:list-item>
        <text:list-item>
          <text:p text:style-name="P4"><text:span text:style-name="Source_20_Text"><text:span text:style-name="T1">spring-boot-starter-web</text:span></text:span>: Pulls in all the necessary libraries to build a RESTful web application, including Spring MVC, Jackson (for JSON), and an embedded Tomcat server.</text:p>
        </text:list-item>
        <text:list-item>
          <text:p text:style-name="P4"><text:span text:style-name="Source_20_Text"><text:span text:style-name="T1">spring-boot-devtools</text:span></text:span>: Provides fast application restarts, LiveReload, and sensible development-time configuration defaults.</text:p>
        </text:list-item>
        <text:list-item>
          <text:p text:style-name="P4"><text:span text:style-name="T1">Dependency Tree in VS Code</text:span>: To view the dependency hierarchy (the equivalent of Eclipse's view), look at the <text:span text:style-name="T1">"Maven"</text:span> panel in the bottom-left of the VS Code Explorer sidebar. Expand <text:span text:style-name="Source_20_Text">spring-learn &gt; Dependencies</text:span> to see how <text:span text:style-name="Source_20_Text">spring-boot-starter-web</text:span> automatically pulls in Tomcat, Jackson, and core Spring libraries.</text:p>
        </text:list-item>
      </text:list>
      <text:p text:style-name="Standard"/>
      <text:h text:style-name="Heading_20_3" text:outline-level="3"><text:soft-page-break/>1. What This Output Means (Log Breakdown)</text:h>
      <text:section text:style-name="Sect1" text:name="model-response-message-contentr_33fa8c9ec24853b9">
        <text:list text:style-name="L4">
          <text:list-item>
            <text:p text:style-name="P5"><text:span text:style-name="Source_20_Text"><text:span text:style-name="T1">Starting SpringLearnApplication...</text:span></text:span> This is the first custom log message we added to your <text:span text:style-name="Source_20_Text">main()</text:span> method. You will notice it printed twice because Spring Boot DevTools uses a "restartedMain" thread to allow for quick reloading when you make code changes.</text:p>
          </text:list-item>
          <text:list-item>
            <text:p text:style-name="P5"><text:span text:style-name="Source_20_Text"><text:span text:style-name="T1">:: Spring Boot :: (v4.1.0)</text:span></text:span><text:span text:style-name="T1"> and </text:span><text:span text:style-name="Source_20_Text"><text:span text:style-name="T1">using Java 17.0.19</text:span></text:span> Spring Boot is announcing its version and confirming it successfully hooked into your installed Java 17 JDK.</text:p>
          </text:list-item>
          <text:list-item>
            <text:p text:style-name="P5"><text:span text:style-name="Source_20_Text"><text:span text:style-name="T1">No active profile set, falling back to 1 default profile: "default"</text:span></text:span> In enterprise applications, you usually have different configurations for different environments (e.g., <text:span text:style-name="Source_20_Text">dev</text:span>, <text:span text:style-name="Source_20_Text">test</text:span>, <text:span text:style-name="Source_20_Text">production</text:span>). Since we haven't specified one, Spring is just using the default base settings.</text:p>
          </text:list-item>
          <text:list-item>
            <text:p text:style-name="P5"><text:span text:style-name="Source_20_Text"><text:span text:style-name="T1">Devtools property defaults active!</text:span></text:span> This confirms that the <text:span text:style-name="Source_20_Text">spring-boot-devtools</text:span> dependency you added in Spring Initializr is active. This is a massive time-saver for developers; if you modify and save a Java file right now, DevTools will automatically hot-reload the application so you don't have to manually stop and restart it.</text:p>
          </text:list-item>
          <text:list-item>
            <text:p text:style-name="P5"><text:span text:style-name="Source_20_Text"><text:span text:style-name="T1">Tomcat initialized with port 8080 (http)</text:span></text:span> &amp; <text:span text:style-name="Source_20_Text"><text:span text:style-name="T1">Starting Servlet engine: [Apache Tomcat]</text:span></text:span> This is the most important part of the log. Tomcat is a web server. Usually, developers have to download, install, and configure Tomcat separately. Because you are using Spring Boot, it has an <text:span text:style-name="T1">embedded</text:span> Tomcat server built right in. It automatically started it up and assigned it to port 8080.</text:p>
          </text:list-item>
          <text:list-item>
            <text:p text:style-name="P5"><text:span text:style-name="Source_20_Text"><text:span text:style-name="T1">Root WebApplicationContext: initialization completed</text:span></text:span> The "Context" is Spring's memory space. This line means Spring has successfully scanned your project, gathered all the necessary background components, and loaded them into memory.</text:p>
          </text:list-item>
          <text:list-item>
            <text:p text:style-name="P5"><text:span text:style-name="Source_20_Text"><text:span text:style-name="T1">SpringLearnApplication started successfully!</text:span></text:span> This is your final custom log, confirming that the <text:span text:style-name="Source_20_Text">SpringApplication.run()</text:span> process finished its job.</text:p>
          </text:list-item>
        </text:list>
        <text:h text:style-name="Heading_20_3" text:outline-level="3">2. What Have You Actually Done? (The Big Picture)</text:h>
        <text:p text:style-name="Text_20_body">By running this application, you have successfully set up the foundation for a modern Java web application. Specifically, you have:</text:p>
        <text:list text:style-name="L5">
          <text:list-item>
            <text:p text:style-name="P6"><text:span text:style-name="T1">Leveraged Spring Boot Auto-Configuration:</text:span> You didn't have to write hundreds of lines of XML or server configuration code. Just by adding the <text:span text:style-name="Source_20_Text">spring-boot-starter-web</text:span> dependency in your <text:span text:style-name="Source_20_Text">pom.xml</text:span>, Spring Boot "magically" knew you wanted to build a web app and configured everything for you in the background.</text:p>
          </text:list-item>
          <text:list-item>
            <text:p text:style-name="P6"><text:span text:style-name="T1">Started a Live Web Server:</text:span> Your computer is currently hosting a live web server. If you open a web browser right now and go to <text:span text:style-name="Source_20_Text">http://localhost:8080</text:span>, you will likely see a "White Label Error Page." This is perfectly normal! It just means the server is running and listening, but you haven't built any REST API endpoints (like <text:span text:style-name="Source_20_Text">/hello</text:span> or <text:span text:style-name="Source_20_Text">/users</text:span>) for it to display yet.</text:p>
          </text:list-item>
          <text:list-item>
            <text:p text:style-name="P6"><text:soft-page-break/><text:span text:style-name="T1">Prepared for REST API Development:</text:span> Your workspace is now fully prepared. The next hands-on exercises will have you building actual Controller classes to send and receive JSON data over this server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21T23:40:18.542537500</meta:creation-date>
    <dc:date>2026-07-21T23:40:29.757283000</dc:date>
    <meta:editing-duration>PT11S</meta:editing-duration>
    <meta:editing-cycles>1</meta:editing-cycles>
    <meta:document-statistic meta:table-count="0" meta:image-count="0" meta:object-count="0" meta:page-count="3" meta:paragraph-count="30" meta:word-count="759" meta:character-count="5097" meta:non-whitespace-character-count="4390"/>
    <meta:generator>LibreOffice/26.2.4.2$Windows_X86_64 LibreOffice_project/0229ac93fcf0d7cbc6376066c6f35021cef002dc</meta:generator>
  </office:meta>
</office:document-meta>
</file>