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2">
      <style:text-properties fo:font-weight="bold"/>
    </style:style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SME Walkthrough Details</text:h>
      <text:p text:style-name="Text_20_body"><text:span text:style-name="T1">1. What happens in the controller method?</text:span> When a network request hits <text:span text:style-name="Source_20_Text">/country</text:span>, Spring invokes <text:span text:style-name="Source_20_Text">getCountryIndia()</text:span>. Inside this method, we manually instantiate a <text:span text:style-name="Source_20_Text">ClassPathXmlApplicationContext</text:span> which reads <text:span text:style-name="Source_20_Text">country.xml</text:span>. Spring creates the <text:span text:style-name="Source_20_Text">Country</text:span> object, injects "IN" and "India" via setter methods, and caches it. The <text:span text:style-name="Source_20_Text">.getBean()</text:span> method retrieves this fully assembled Java object, and the method directly returns it.</text:p>
      <text:p text:style-name="Text_20_body"><text:span text:style-name="T1">2. How the bean is converted into a JSON response?</text:span> This is handled entirely by Spring Boot and a background library called <text:span text:style-name="T1">Jackson</text:span>. Because you annotated the class with <text:span text:style-name="Source_20_Text">@RestController</text:span>, Spring knows it should not try to load a physical HTML web page. Instead, it intercepts the <text:span text:style-name="Source_20_Text">Country</text:span> Java object returned by your method and automatically passes it to the Jackson library. Jackson reads your getters (<text:span text:style-name="Source_20_Text">getCode()</text:span>, <text:span text:style-name="Source_20_Text">getName()</text:span>) and serializes the data into a standard JSON string format before wrapping it in an HTTP response.</text:p>
      <text:p text:style-name="P1">3. HTTP Headers in Chrome Developer Tools &amp; Postman</text:p>
      <text:list text:style-name="L1">
        <text:list-item>
          <text:p text:style-name="P2"><text:span text:style-name="T1">In Chrome:</text:span> Press <text:span text:style-name="T1">F12</text:span>, go to the <text:span text:style-name="T1">Network</text:span> tab, refresh the page, and click the <text:span text:style-name="Source_20_Text">country</text:span> request. Under the <text:span text:style-name="T1">Headers</text:span> &gt; <text:span text:style-name="T1">Response Headers</text:span> section, you will see <text:span text:style-name="Source_20_Text">Content-Type: application/json</text:span>. This is the crucial header added by Jackson that tells your browser, "This isn't raw text or HTML; treat this as a structured JSON data payload."</text:p>
        </text:list-item>
        <text:list-item>
          <text:p text:style-name="P2"><text:span text:style-name="T1">In Postman:</text:span> Send the GET request, and click the <text:span text:style-name="T1">Headers</text:span> tab in the lower response window. You will see the identical <text:span text:style-name="Source_20_Text">Content-Type: application/json</text:span> header confirming the automated serialization.</text:p>
        </text:list-item>
      </text:list>
      <text:h text:style-name="Heading_20_3" text:outline-level="3">Workflow Summary</text:h>
      <text:list text:style-name="L2">
        <text:list-item>
          <text:p text:style-name="P3"><text:span text:style-name="T1">Objective:</text:span> Build a REST endpoint that retrieves a bean defined in an XML configuration and returns it as a JSON payload.</text:p>
        </text:list-item>
        <text:list-item>
          <text:p text:style-name="P4">What was actually done:</text:p>
          <text:list>
            <text:list-item>
              <text:p text:style-name="P3">Recreated the <text:span text:style-name="Source_20_Text">Country</text:span> POJO (Plain Old Java Object).</text:p>
            </text:list-item>
            <text:list-item>
              <text:p text:style-name="P3">Created <text:span text:style-name="Source_20_Text">country.xml</text:span> to define the "IN" country bean properties.</text:p>
            </text:list-item>
            <text:list-item>
              <text:p text:style-name="P3">Created <text:span text:style-name="Source_20_Text">CountryController.java</text:span> using <text:span text:style-name="Source_20_Text">@RequestMapping</text:span>.</text:p>
            </text:list-item>
            <text:list-item>
              <text:p text:style-name="P3">Loaded the Spring context manually within the controller method to fetch the bean.</text:p>
            </text:list-item>
            <text:list-item>
              <text:p text:style-name="P3">Returned the bean, allowing Spring Boot's internal Jackson dependency to automatically convert the Java object into a JSON HTTP response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22T21:36:36.399941600</meta:creation-date>
    <dc:date>2026-07-22T21:36:41.159062900</dc:date>
    <meta:editing-duration>PT5S</meta:editing-duration>
    <meta:editing-cycles>1</meta:editing-cycles>
    <meta:document-statistic meta:table-count="0" meta:image-count="0" meta:object-count="0" meta:page-count="1" meta:paragraph-count="14" meta:word-count="327" meta:character-count="2091" meta:non-whitespace-character-count="1787"/>
    <meta:generator>LibreOffice/26.2.4.2$Windows_X86_64 LibreOffice_project/0229ac93fcf0d7cbc6376066c6f35021cef002dc</meta:generator>
  </office:meta>
</office:document-meta>
</file>